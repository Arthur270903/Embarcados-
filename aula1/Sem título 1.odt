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520b2" officeooo:paragraph-rsid="001520b2"/>
    </style:style>
    <style:style style:name="P2" style:family="paragraph" style:parent-style-name="Standard" style:list-style-name="L1"/>
    <style:style style:name="P3" style:family="paragraph" style:parent-style-name="Standard">
      <style:text-properties officeooo:rsid="0017f8b2" officeooo:paragraph-rsid="0017f8b2"/>
    </style:style>
    <style:style style:name="P4" style:family="paragraph" style:parent-style-name="Standard" style:list-style-name="L1">
      <style:text-properties officeooo:rsid="0018fb94" officeooo:paragraph-rsid="0018fb9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tividade 1 </text:h>
      <text:list text:style-name="L1">
        <text:list-item>
          <text:p text:style-name="P2">Por que os LEDs são Active Low (acendem quando se coloca 0 na saída)? </text:p>
        </text:list-item>
      </text:list>
      <text:p text:style-name="P3"><text:tab/>Isso ocorre devido as caracteriscas da placa, o led já tem seu terminal anodo ligado na fonte de tensão vcc e quando chavei para active low ele fecha o caminho para a corrente fluir </text:p>
      <text:list text:continue-numbering="true" text:style-name="L1">
        <text:list-item>
          <text:p text:style-name="P2">Quais funções você usou para acender e apagar os LEDs?</text:p>
          <text:p text:style-name="P2">gpio_pin_set(port, LED_PIN, 0);</text:p>
          <text:p text:style-name="P2">gpio_pin_set(port, LED_PIN, 1);</text:p>
          <text:p text:style-name="P2"/>
        </text:list-item>
        <text:list-item>
          <text:p text:style-name="P2">Explique o que é o DeviceTree. </text:p>
          <text:p text:style-name="P4">É uma estrutura de mapeamento de hardware em que em vez de trabalhar com os endereços de memoria ele trabalha com outros nomes de identificação . </text:p>
        </text:list-item>
        <text:list-item>
          <text:p text:style-name="P2">Explique as abstrações feitas pelo Sistema Operacional.</text:p>
          <text:p text:style-name="P2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0T17:40:56.397768152</meta:creation-date>
    <meta:editing-duration>PT21M27S</meta:editing-duration>
    <meta:editing-cycles>2</meta:editing-cycles>
    <meta:generator>LibreOffice/26.2.2.2$Linux_X86_64 LibreOffice_project/620$Build-2</meta:generator>
    <dc:date>2026-05-10T19:00:37.989035133</dc:date>
    <meta:document-statistic meta:table-count="0" meta:image-count="0" meta:object-count="0" meta:page-count="1" meta:paragraph-count="9" meta:word-count="109" meta:character-count="621" meta:non-whitespace-character-count="519"/>
  </office:meta>
</office:document-meta>
</file>