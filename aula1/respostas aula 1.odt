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520b2" officeooo:paragraph-rsid="001520b2"/>
    </style:style>
    <style:style style:name="P2" style:family="paragraph" style:parent-style-name="Text_20_body">
      <style:paragraph-properties fo:text-align="center" style:justify-single-word="false"/>
      <style:text-properties officeooo:rsid="001d87cd" officeooo:paragraph-rsid="001d87cd"/>
    </style:style>
    <style:style style:name="P3" style:family="paragraph" style:parent-style-name="Standard" style:list-style-name="L1"/>
    <style:style style:name="P4" style:family="paragraph" style:parent-style-name="Standard">
      <style:text-properties officeooo:rsid="0017f8b2" officeooo:paragraph-rsid="0017f8b2"/>
    </style:style>
    <style:style style:name="P5" style:family="paragraph" style:parent-style-name="Standard" style:list-style-name="L1">
      <style:text-properties officeooo:rsid="0018fb94" officeooo:paragraph-rsid="0018fb94"/>
    </style:style>
    <style:style style:name="P6" style:family="paragraph" style:parent-style-name="Standard" style:list-style-name="L1">
      <style:text-properties officeooo:rsid="001c2f88" officeooo:paragraph-rsid="001c2f88"/>
    </style:style>
    <style:style style:name="P7" style:family="paragraph" style:parent-style-name="Standard">
      <style:text-properties officeooo:paragraph-rsid="001d87cd"/>
    </style:style>
    <style:style style:name="P8" style:family="paragraph" style:parent-style-name="Standard">
      <style:text-properties officeooo:rsid="001d87cd" officeooo:paragraph-rsid="001d87cd"/>
    </style:style>
    <style:style style:name="P9" style:family="paragraph" style:parent-style-name="Standard">
      <style:paragraph-properties fo:margin-top="0cm" fo:margin-bottom="0.499cm" style:contextual-spacing="false"/>
    </style:style>
    <style:style style:name="P10" style:family="paragraph" style:parent-style-name="Preformatted_20_Text">
      <style:paragraph-properties fo:margin-top="0cm" fo:margin-bottom="0.499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tividade 1 </text:h>
      <text:p text:style-name="P2">Nome:ARTHUR SANTOS ALENCAR</text:p>
      <text:p text:style-name="P2">NUSP:13684745</text:p>
      <text:list text:style-name="L1">
        <text:list-item>
          <text:p text:style-name="P3">Por que os LEDs são Active Low (acendem quando se coloca 0 na saída)? </text:p>
        </text:list-item>
      </text:list>
      <text:p text:style-name="P4"><text:tab/>Isso ocorre devido as caracteriscas da placa, o led já tem seu terminal anodo ligado na fonte de tensão vcc e quando chavei para active low ele fecha o caminho para a corrente fluir </text:p>
      <text:list text:continue-numbering="true" text:style-name="L1">
        <text:list-item>
          <text:p text:style-name="P3">Quais funções você usou para acender e apagar os LEDs?</text:p>
          <text:p text:style-name="P3">gpio_pin_set(port, LED_PIN, 0);</text:p>
          <text:p text:style-name="P3">gpio_pin_set(port, LED_PIN, 1);</text:p>
          <text:p text:style-name="P3"/>
        </text:list-item>
        <text:list-item>
          <text:p text:style-name="P3">Explique o que é o DeviceTree. </text:p>
          <text:p text:style-name="P5">É uma estrutura de mapeamento de hardware em que em vez de trabalhar com os endereços de memoria ele trabalha com outros nomes de identificação . </text:p>
        </text:list-item>
        <text:list-item>
          <text:p text:style-name="P3">Explique as abstrações feitas pelo Sistema Operacional.</text:p>
          <text:p text:style-name="P6">De hardwere </text:p>
          <text:p text:style-name="P6">De controle </text:p>
          <text:p text:style-name="P6">E de tempo </text:p>
        </text:list-item>
      </text:list>
      <text:p text:style-name="Standard"/>
      <text:p text:style-name="P7"><text:a xlink:type="simple" xlink:href="https://github.com/Arthur270903/Embarcados-.git" text:style-name="Internet_20_link" text:visited-style-name="Visited_20_Internet_20_Link">https://github.com/Arthur270903/Embarcados-.git</text:a></text:p>
      <text:p text:style-name="P8">piscaFarol.CPP</text:p>
      <text:p text:style-name="P9"/>
      <text:p text:style-name="Text_20_body">#include &lt;zephyr.h&gt; #include &lt;device.h&gt; #include &lt;drivers/gpio.h&gt;</text:p>
      <text:p text:style-name="Text_20_body">#define LED_PORT "GPIO_1" // Tente mudar para "GPIOB" se continuar não piscando</text:p>
      <text:p text:style-name="Text_20_body">// Pinos reais do LED RGB embutido na FRDM-KL25Z #define LED_RED_PIN <text:s text:c="2"/>18 <text:s/>// PTB18 #define LED_GREEN_PIN 19 <text:s/>// PTB19</text:p>
      <text:p text:style-name="Text_20_body">// Tempos do semáforo #define TIME_RED_MS <text:s text:c="3"/>5000 #define TIME_GREEN_MS <text:s/>4000 #define TIME_YELLOW_MS 1000</text:p>
      <text:p text:style-name="Text_20_body">typedef enum { STATE_RED, STATE_GREEN, STATE_YELLOW } traffic_light_state_t;</text:p>
      <text:p text:style-name="Text_20_body">void main(void) { const struct device *port = device_get_binding(LED_PORT);</text:p>
      <text:p text:style-name="P10">// Configurando os pinos<text:line-break/>gpio_pin_configure(port, LED_RED_PIN, GPIO_OUTPUT);<text:line-break/>gpio_pin_configure(port, LED_GREEN_PIN, GPIO_OUTPUT);<text:line-break/><text:line-break/>traffic_light_state_t current_state = STATE_RED;<text:line-break/><text:line-break/>while (1) {<text:line-break/> <text:s text:c="3"/>// 1. APAGA TUDO (Lógica invertida: 1 = apagado)<text:line-break/> <text:s text:c="3"/>gpio_pin_set(port, LED_RED_PIN, 1);<text:line-break/> <text:s text:c="3"/>gpio_pin_set(port, LED_GREEN_PIN, 1);<text:line-break/><text:line-break/> <text:s text:c="3"/>// 2. AVALIA O ESTADO E ACENDE A COR CERTA (0 = aceso)<text:line-break/> <text:s text:c="3"/>switch (current_state) {<text:line-break/> <text:s text:c="7"/>case STATE_RED:<text:line-break/> <text:s text:c="11"/>gpio_pin_set(port, LED_RED_PIN, 0); <text:line-break/> <text:s text:c="11"/>k_msleep(TIME_RED_MS);<text:line-break/> <text:s text:c="11"/>current_state = STATE_GREEN;<text:line-break/> <text:s text:c="11"/>break;<text:line-break/><text:soft-page-break/><text:line-break/> <text:s text:c="7"/>case STATE_GREEN:<text:line-break/> <text:s text:c="11"/>gpio_pin_set(port, LED_GREEN_PIN, 0); <text:line-break/> <text:s text:c="11"/>k_msleep(TIME_GREEN_MS);<text:line-break/> <text:s text:c="11"/>current_state = STATE_YELLOW;<text:line-break/> <text:s text:c="11"/>break;<text:line-break/><text:line-break/> <text:s text:c="7"/>case STATE_YELLOW:<text:line-break/> <text:s text:c="11"/>// Amarelo = Vermelho + Verde ligados juntos!<text:line-break/> <text:s text:c="11"/>gpio_pin_set(port, LED_RED_PIN, 0); <text:line-break/> <text:s text:c="11"/>gpio_pin_set(port, LED_GREEN_PIN, 0); <text:line-break/> <text:s text:c="11"/>k_msleep(TIME_YELLOW_MS);<text:line-break/> <text:s text:c="11"/>current_state = STATE_RED;<text:line-break/> <text:s text:c="11"/>break;<text:line-break/> <text:s text:c="3"/>}<text:line-break/>}</text:p>
      <text:p text:style-name="Text_20_body">}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0T17:40:56.397768152</meta:creation-date>
    <meta:editing-duration>PT1H4M1S</meta:editing-duration>
    <meta:editing-cycles>5</meta:editing-cycles>
    <meta:generator>LibreOffice/26.2.2.2$Linux_X86_64 LibreOffice_project/620$Build-2</meta:generator>
    <dc:date>2026-05-10T19:55:41.708868980</dc:date>
    <meta:print-date>2026-05-10T19:50:46.695073401</meta:print-date>
    <meta:printed-by>Arquivos PDF</meta:printed-by>
    <meta:document-statistic meta:table-count="0" meta:image-count="0" meta:object-count="0" meta:page-count="2" meta:paragraph-count="24" meta:word-count="281" meta:character-count="2326" meta:non-whitespace-character-count="1831"/>
  </office:meta>
</office:document-meta>
</file>